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18in"/>
    </style:style>
    <style:style style:name="co4" style:family="table-column">
      <style:table-column-properties fo:break-before="auto" style:column-width="1.3173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4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cccccc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bital period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lanets</text:p>
          </table:table-cell>
          <table:table-cell table:style-name="ce1" office:value-type="string" calcext:value-type="string">
            <text:p>NASA data</text:p>
          </table:table-cell>
          <table:table-cell table:style-name="ce1" office:value-type="string" calcext:value-type="string">
            <text:p>Sim data</text:p>
          </table:table-cell>
          <table:table-cell table:style-name="ce1" office:value-type="string" calcext:value-type="string">
            <text:p>Perc. Err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rs</text:p>
          </table:table-cell>
          <table:table-cell office:value-type="float" office:value="1.88" calcext:value-type="float">
            <text:p>1.88</text:p>
          </table:table-cell>
          <table:table-cell office:value-type="float" office:value="1.88111667453944" calcext:value-type="float">
            <text:p>1.88111667453944</text:p>
          </table:table-cell>
          <table:table-cell table:style-name="ce2" table:formula="of:=([.E4]-[.D4])/[.D4]" office:value-type="percentage" office:value="0.00059397581885117" calcext:value-type="percentage">
            <text:p>0.06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arth</text:p>
          </table:table-cell>
          <table:table-cell office:value-type="float" office:value="1" calcext:value-type="float">
            <text:p>1</text:p>
          </table:table-cell>
          <table:table-cell office:value-type="float" office:value="0.993889912826899" calcext:value-type="float">
            <text:p>0.993889912826899</text:p>
          </table:table-cell>
          <table:table-cell table:style-name="ce2" table:formula="of:=([.E5]-[.D5])/[.D5]" office:value-type="percentage" office:value="-0.00611008717310102" calcext:value-type="percentage">
            <text:p>-0.61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upiter</text:p>
          </table:table-cell>
          <table:table-cell office:value-type="float" office:value="11.9" calcext:value-type="float">
            <text:p>11.9</text:p>
          </table:table-cell>
          <table:table-cell office:value-type="float" office:value="11.8351876116736" calcext:value-type="float">
            <text:p>11.8351876116736</text:p>
          </table:table-cell>
          <table:table-cell table:style-name="ce2" table:formula="of:=([.E6]-[.D6])/[.D6]" office:value-type="percentage" office:value="-0.00544641918709246" calcext:value-type="percentage">
            <text:p>-0.54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nus</text:p>
          </table:table-cell>
          <table:table-cell office:value-type="float" office:value="0.615" calcext:value-type="float">
            <text:p>0.615</text:p>
          </table:table-cell>
          <table:table-cell office:value-type="float" office:value="0.613350676801756" calcext:value-type="float">
            <text:p>0.613350676801756</text:p>
          </table:table-cell>
          <table:table-cell table:style-name="ce2" table:formula="of:=([.E7]-[.D7])/[.D7]" office:value-type="percentage" office:value="-0.00268182633860806" calcext:value-type="percentage">
            <text:p>-0.27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rcury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1431476939642" calcext:value-type="float">
            <text:p>0.241431476939642</text:p>
          </table:table-cell>
          <table:table-cell table:style-name="ce2" table:formula="of:=([.E8]-[.D8])/[.D8]" office:value-type="percentage" office:value="0.00179036074540256" calcext:value-type="percentage">
            <text:p>0.18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turn</text:p>
          </table:table-cell>
          <table:table-cell office:value-type="float" office:value="29.4" calcext:value-type="float">
            <text:p>29.4</text:p>
          </table:table-cell>
          <table:table-cell office:value-type="float" office:value="29.2915068493151" calcext:value-type="float">
            <text:p>29.2915068493151</text:p>
          </table:table-cell>
          <table:table-cell table:style-name="ce2" table:formula="of:=([.E9]-[.D9])/[.D9]" office:value-type="percentage" office:value="-0.00369024322057484" calcext:value-type="percentage">
            <text:p>-0.37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ranus</text:p>
          </table:table-cell>
          <table:table-cell office:value-type="float" office:value="83.7" calcext:value-type="float">
            <text:p>83.7</text:p>
          </table:table-cell>
          <table:table-cell office:value-type="float" office:value="82.9458447488585" calcext:value-type="float">
            <text:p>82.9458447488585</text:p>
          </table:table-cell>
          <table:table-cell table:style-name="ce2" table:formula="of:=([.E10]-[.D10])/[.D10]" office:value-type="percentage" office:value="-0.00901021805425923" calcext:value-type="percentage">
            <text:p>-0.90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ptune</text:p>
          </table:table-cell>
          <table:table-cell office:value-type="float" office:value="163.7" calcext:value-type="float">
            <text:p>163.7</text:p>
          </table:table-cell>
          <table:table-cell office:value-type="float" office:value="162.535342465753" calcext:value-type="float">
            <text:p>162.535342465753</text:p>
          </table:table-cell>
          <table:table-cell table:style-name="ce2" table:formula="of:=([.E11]-[.D11])/[.D11]" office:value-type="percentage" office:value="-0.00711458481519242" calcext:value-type="percentage">
            <text:p>-0.71%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Average</text:p>
          </table:table-cell>
          <table:table-cell table:style-name="ce3" table:formula="of:=AVERAGE([.F4:.F11])" office:value-type="percentage" office:value="-0.00395863027807179" calcext:value-type="percentage">
            <text:p>-0.40%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Deviation</text:p>
          </table:table-cell>
          <table:table-cell table:style-name="ce1" table:formula="of:=SQRT(VAR([.F4:.F11]))" office:value-type="float" office:value="0.0037378422095425" calcext:value-type="float">
            <text:p>0.003737842209542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0.004(4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lignments</text:p>
          </table:table-cell>
          <table:table-cell table:number-columns-repeated="5"/>
          <table:table-cell table:style-name="ce4" table:number-columns-repeated="2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ub-alignment 1</text:p>
          </table:table-cell>
          <table:table-cell table:style-name="ce1" office:value-type="string" calcext:value-type="string">
            <text:p>Sub-alignment 2</text:p>
          </table:table-cell>
          <table:table-cell table:style-name="ce1" office:value-type="string" calcext:value-type="string">
            <text:p>Sub-alignment 3</text:p>
          </table:table-cell>
          <table:table-cell table:style-name="ce1" office:value-type="string" calcext:value-type="string">
            <text:p>Sub-alignment 4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Time lapsed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Main alignment 1</text:p>
          </table:table-cell>
          <table:table-cell office:value-type="float" office:value="0" calcext:value-type="float">
            <text:p>0</text:p>
          </table:table-cell>
          <table:table-cell office:value-type="float" office:value="1.59342465753425" calcext:value-type="float">
            <text:p>1.59342465753425</text:p>
          </table:table-cell>
          <table:table-cell table:number-columns-repeated="2" office:value-type="string" calcext:value-type="string">
            <text:p>NaN</text:p>
          </table:table-cell>
          <table:table-cell table:formula="of:=AVERAGE([.D18:.G18])" office:value-type="float" office:value="0.796712328767125" calcext:value-type="float">
            <text:p>0.796712328767125</text:p>
          </table:table-cell>
          <table:table-cell office:value-type="string" calcext:value-type="string">
            <text:p>N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 alignment 2</text:p>
          </table:table-cell>
          <table:table-cell office:value-type="float" office:value="64.1279452054795" calcext:value-type="float">
            <text:p>64.1279452054795</text:p>
          </table:table-cell>
          <table:table-cell office:value-type="float" office:value="65.7202739726027" calcext:value-type="float">
            <text:p>65.7202739726027</text:p>
          </table:table-cell>
          <table:table-cell office:value-type="float" office:value="67.3161643835616" calcext:value-type="float">
            <text:p>67.3161643835616</text:p>
          </table:table-cell>
          <table:table-cell office:value-type="float" office:value="68.9131506849315" calcext:value-type="float">
            <text:p>68.9131506849315</text:p>
          </table:table-cell>
          <table:table-cell table:formula="of:=AVERAGE([.D19:.G19])" office:value-type="float" office:value="66.5193835616438" calcext:value-type="float">
            <text:p>66.5193835616438</text:p>
          </table:table-cell>
          <table:table-cell table:formula="of:=[.H19]-[.H18]" office:value-type="float" office:value="65.7226712328767" calcext:value-type="float">
            <text:p>65.72267123287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 alignment 3</text:p>
          </table:table-cell>
          <table:table-cell office:value-type="float" office:value="129.851780821918" calcext:value-type="float">
            <text:p>129.851780821918</text:p>
          </table:table-cell>
          <table:table-cell office:value-type="float" office:value="131.444383561644" calcext:value-type="float">
            <text:p>131.444383561644</text:p>
          </table:table-cell>
          <table:table-cell office:value-type="float" office:value="133.039452054795" calcext:value-type="float">
            <text:p>133.039452054795</text:p>
          </table:table-cell>
          <table:table-cell office:value-type="float" office:value="134.635342465753" calcext:value-type="float">
            <text:p>134.635342465753</text:p>
          </table:table-cell>
          <table:table-cell table:formula="of:=AVERAGE([.D20:.G20])" office:value-type="float" office:value="132.242739726028" calcext:value-type="float">
            <text:p>132.242739726028</text:p>
          </table:table-cell>
          <table:table-cell table:formula="of:=[.H20]-[.H19]" office:value-type="float" office:value="65.7233561643837" calcext:value-type="float">
            <text:p>65.72335616438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 alignment 4</text:p>
          </table:table-cell>
          <table:table-cell office:value-type="float" office:value="195.575890410959" calcext:value-type="float">
            <text:p>195.575890410959</text:p>
          </table:table-cell>
          <table:table-cell office:value-type="float" office:value="197.168767123288" calcext:value-type="float">
            <text:p>197.168767123288</text:p>
          </table:table-cell>
          <table:table-cell office:value-type="float" office:value="198.763287671233" calcext:value-type="float">
            <text:p>198.763287671233</text:p>
          </table:table-cell>
          <table:table-cell office:value-type="float" office:value="200.359178082192" calcext:value-type="float">
            <text:p>200.359178082192</text:p>
          </table:table-cell>
          <table:table-cell table:formula="of:=AVERAGE([.D21:.G21])" office:value-type="float" office:value="197.966780821918" calcext:value-type="float">
            <text:p>197.966780821918</text:p>
          </table:table-cell>
          <table:table-cell table:formula="of:=[.H21]-[.H20]" office:value-type="float" office:value="65.7240410958904" calcext:value-type="float">
            <text:p>65.72404109589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1.3" calcext:value-type="float">
            <text:p>261.3</text:p>
          </table:table-cell>
          <table:table-cell office:value-type="float" office:value="262.893424657534" calcext:value-type="float">
            <text:p>262.893424657534</text:p>
          </table:table-cell>
          <table:table-cell office:value-type="float" office:value="264.487671232877" calcext:value-type="float">
            <text:p>264.487671232877</text:p>
          </table:table-cell>
          <table:table-cell office:value-type="float" office:value="266.084657534247" calcext:value-type="float">
            <text:p>266.084657534247</text:p>
          </table:table-cell>
          <table:table-cell table:formula="of:=AVERAGE([.D22:.G22])" office:value-type="float" office:value="263.691438356165" calcext:value-type="float">
            <text:p>263.691438356165</text:p>
          </table:table-cell>
          <table:table-cell table:formula="of:=[.H22]-[.H21]" office:value-type="float" office:value="65.7246575342466" calcext:value-type="float">
            <text:p>65.7246575342466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Average</text:p>
          </table:table-cell>
          <table:table-cell table:style-name="ce1" table:formula="of:=AVERAGE([.I19:.I22])" office:value-type="float" office:value="65.7236815068494" calcext:value-type="float">
            <text:p>65.7236815068494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ce4" table:number-columns-repeated="2"/>
          <table:table-cell/>
        </table:table-row>
        <table:table-row table:style-name="ro1">
          <table:table-cell table:number-columns-repeated="7"/>
          <table:table-cell table:style-name="ce4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17:48:19.796000000</meta:creation-date>
    <dc:date>2025-04-02T17:58:57.394000000</dc:date>
    <meta:editing-duration>PT10M37S</meta:editing-duration>
    <meta:editing-cycles>3</meta:editing-cycles>
    <meta:generator>LibreOffice/24.8.5.2$Windows_X86_64 LibreOffice_project/fddf2685c70b461e7832239a0162a77216259f22</meta:generator>
    <meta:document-statistic meta:table-count="1" meta:cell-count="85" meta:object-count="0"/>
  </office:meta>
</office:document-meta>
</file>